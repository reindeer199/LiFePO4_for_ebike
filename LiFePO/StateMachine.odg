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2.33cm"/>
      <style:paragraph-properties style:writing-mode="lr-tb"/>
    </style:style>
    <style:style style:name="gr2" style:family="graphic" style:parent-style-name="standard">
      <style:graphic-properties svg:stroke-color="#ea7500" draw:fill="none" draw:textarea-horizontal-align="justify" draw:textarea-vertical-align="middle" draw:auto-grow-height="false" fo:min-height="0.25cm" fo:min-width="1cm"/>
      <style:paragraph-properties style:writing-mode="lr-tb"/>
    </style:style>
    <style:style style:name="gr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1.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76cm" fo:min-width="6.908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2.528cm" fo:min-width="4.686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4.38cm" fo:min-width="8.76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2.528cm" fo:min-width="4.964cm"/>
      <style:paragraph-properties style:writing-mode="lr-tb"/>
    </style:style>
    <style:style style:name="gr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25cm" fo:min-width="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10" style:family="graphic" style:parent-style-name="objectwithoutfill">
      <style:graphic-properties draw:marker-end="Symmetric_20_Arrow" draw:marker-end-width="0.3cm" draw:fill="solid" draw:textarea-vertical-align="top"/>
      <style:paragraph-properties style:writing-mode="lr-tb"/>
    </style:style>
    <style:style style:name="gr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3.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1.602cm" fo:min-width="8.76cm"/>
      <style:paragraph-properties style:writing-mode="lr-tb"/>
    </style:style>
    <style:style style:name="gr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2.9cm"/>
      <style:paragraph-properties style:writing-mode="lr-tb"/>
    </style:style>
    <style:style style:name="gr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3.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3.7cm"/>
      <style:paragraph-properties style:writing-mode="lr-tb"/>
    </style:style>
    <style:style style:name="gr19" style:family="graphic" style:parent-style-name="objectwithoutfill">
      <style:graphic-properties draw:marker-start="" draw:marker-end="Symmetric_20_Arrow" draw:marker-end-width="0.3cm" draw:fill="solid" draw:textarea-vertical-align="middle"/>
    </style:style>
    <style:style style:name="gr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5cm" fo:min-width="3.9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marker-end="Symmetric_20_Arrow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margin-left="0cm" fo:margin-right="0cm" fo:margin-top="0cm" fo:margin-bottom="0.6cm" fo:line-height="100%" fo:text-align="start" fo:text-indent="0cm"/>
    </style:style>
    <style:style style:name="P14" style:family="paragraph">
      <loext:graphic-properties draw:fill="solid"/>
      <style:paragraph-properties fo:margin-left="0cm" fo:margin-right="0cm" fo:margin-top="0cm" fo:margin-bottom="0.6cm" fo:line-height="100%" fo:text-align="start" fo:text-indent="0cm" style:writing-mode="lr-tb"/>
      <style:text-properties fo:font-size="10pt" style:font-size-asian="10pt" style:font-size-complex="10pt"/>
    </style:style>
    <style:style style:name="P15" style:family="paragraph">
      <style:paragraph-properties fo:text-align="end"/>
    </style:style>
    <style:style style:name="P16" style:family="paragraph">
      <loext:graphic-properties draw:fill="solid"/>
      <style:paragraph-properties fo:text-align="end" style:writing-mode="lr-tb"/>
      <style:text-properties fo:font-size="10pt" style:font-size-asian="10pt" style:font-size-complex="10pt"/>
    </style:style>
    <style:style style:name="P17" style:family="paragraph">
      <style:paragraph-properties fo:text-align="center"/>
    </style:style>
    <style:style style:name="P18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5.40000009536743pt" style:font-size-complex="5.40000009536743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4" draw:id="id14" draw:layer="layout" svg:width="4cm" svg:height="1cm" svg:x="7cm" svg:y="1cm">
          <text:p text:style-name="P1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3cm" svg:height="1cm" svg:x="4.4cm" svg:y="15cm">
          <text:p text:style-name="P3"><text:span text:style-name="T1">Curr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2" draw:id="id2" draw:layer="layout" svg:width="2.4cm" svg:height="0.6cm" svg:x="8.8cm" svg:y="7.2cm">
          <text:p text:style-name="P5"><text:span text:style-name="T2">Ct</text:span><text:span text:style-name="T2">r_I</text:span><text:span text:style-name="T2">dl</text:span><text:span text:style-name="T2">e+</text:span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8cm" svg:height="1cm" svg:x="5cm" svg:y="3.001cm">
          <text:p text:style-name="P1">NE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xml:id="id16" draw:id="id16" draw:layer="layout" svg:width="8cm" svg:height="1cm" svg:x="5cm" svg:y="5cm">
          <text:p text:style-name="P7">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0" draw:layer="layout" svg:width="5.6cm" svg:height="3cm" svg:x="3cm" svg:y="13cm">
          <text:p text:style-name="P9">DISCHA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8" draw:layer="layout" svg:width="10cm" svg:height="5cm" svg:x="4cm" svg:y="7cm">
          <text:p text:style-name="P7"/>
          <text:p text:style-name="P7">ID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draw:layer="layout" svg:width="5.9cm" svg:height="3cm" svg:x="9.5cm" svg:y="13cm">
          <text:p text:style-name="P7">CHA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8" draw:id="id8" draw:layer="layout" svg:width="3cm" svg:height="1cm" svg:x="10.5cm" svg:y="10.5cm">
          <text:p text:style-name="P11"><text:span text:style-name="T2">Ctr_Idle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cm" svg:height="1cm" svg:x="8.5cm" svg:y="8.5cm">
          <text:p text:style-name="P3"><text:span text:style-name="T1">Curr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cm" svg:height="1cm" svg:x="4.8cm" svg:y="9.5cm">
          <text:p text:style-name="P3"><text:span text:style-name="T1">Curr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cm" svg:height="1cm" svg:x="11.3cm" svg:y="15cm">
          <text:p text:style-name="P3"><text:span text:style-name="T1">Curr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4" draw:layer="layout" draw:line-skew="-1.399cm" svg:x1="4.4cm" svg:y1="15.5cm" svg:x2="8.8cm" svg:y2="7.5cm" draw:start-shape="id1" draw:start-glue-point="5" draw:end-shape="id2" draw:end-glue-point="3" svg:d="M4400 15500h-1900v-8000h6300" svg:viewBox="0 0 6301 8001">
          <text:p text:style-name="P13"><text:span text:style-name="T3">&gt; -</text:span><text:span text:style-name="T3">20</text:span></text:p>
        </draw:connector>
        <draw:connector draw:style-name="gr10" draw:text-style-name="P16" draw:layer="layout" svg:x1="4.8cm" svg:y1="10cm" svg:x2="3.8cm" svg:y2="14.3cm" draw:start-shape="id3" draw:start-glue-point="5" draw:end-shape="id4" draw:end-glue-point="3" svg:d="M4800 10000h-1501v4300h501" svg:viewBox="0 0 1502 4301">
          <text:p text:style-name="P15"><text:span text:style-name="T4">&lt; -30</text:span></text:p>
        </draw:connector>
        <draw:custom-shape draw:style-name="gr11" draw:text-style-name="P12" xml:id="id11" draw:id="id11" draw:layer="layout" svg:width="4cm" svg:height="0.6cm" svg:x="8cm" svg:y="5.2cm">
          <text:p text:style-name="P11"><text:span text:style-name="T5">Set BATT_STAT_INIT</text:span></text:p>
          <draw:enhanced-geometry svg:viewBox="0 0 21600 21600" draw:type="rectangle" draw:enhanced-path="M 0 0 L 21600 0 21600 21600 0 21600 0 0 Z N"/>
        </draw:custom-shape>
        <draw:connector draw:style-name="gr12" draw:text-style-name="P16" draw:layer="layout" svg:x1="11.5cm" svg:y1="9cm" svg:x2="14.718cm" svg:y2="14.3cm" draw:start-shape="id5" draw:start-glue-point="7" draw:end-shape="id6" draw:end-glue-point="1" svg:d="M11500 9000h3756v5300h-538" svg:viewBox="0 0 3757 5301">
          <text:p text:style-name="P15"><text:span text:style-name="T4">&gt; 20</text:span></text:p>
        </draw:connector>
        <draw:connector draw:style-name="gr9" draw:text-style-name="P16" draw:layer="layout" draw:line-skew="0.998cm" svg:x1="14.3cm" svg:y1="15.5cm" svg:x2="11.2cm" svg:y2="7.5cm" draw:start-shape="id7" draw:start-glue-point="7" draw:end-shape="id2" draw:end-glue-point="1" svg:d="M14300 15500h1500v-8000h-4600" svg:viewBox="0 0 4601 8001">
          <text:p text:style-name="P15"><text:span text:style-name="T4">&lt; 0</text:span></text:p>
        </draw:connector>
        <draw:connector draw:style-name="gr13" draw:text-style-name="P18" draw:layer="layout" svg:x1="8.5cm" svg:y1="9cm" svg:x2="6.3cm" svg:y2="9.5cm" draw:start-shape="id5" draw:start-glue-point="5" draw:end-shape="id3" draw:end-glue-point="4" svg:d="M8500 9000h-2200v500" svg:viewBox="0 0 2201 501">
          <text:p text:style-name="P17"><text:span text:style-name="T4">else</text:span></text:p>
        </draw:connector>
        <draw:connector draw:style-name="gr12" draw:text-style-name="P18" draw:layer="layout" svg:x1="7.8cm" svg:y1="10cm" svg:x2="12cm" svg:y2="10.5cm" draw:start-shape="id3" draw:start-glue-point="7" draw:end-shape="id8" draw:end-glue-point="4" svg:d="M7800 10000h1351v-1h2849v501" svg:viewBox="0 0 4201 502">
          <text:p text:style-name="P17"><text:span text:style-name="T4">else</text:span></text:p>
        </draw:connector>
        <draw:custom-shape draw:style-name="gr14" draw:text-style-name="P8" xml:id="id12" draw:id="id12" draw:layer="layout" svg:width="10cm" svg:height="2cm" svg:x="4cm" svg:y="17cm">
          <text:p text:style-name="P7">SHUTDOW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3" draw:id="id13" draw:layer="layout" svg:width="4cm" svg:height="1cm" svg:x="7cm" svg:y="20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9" draw:id="id9" draw:layer="layout" svg:width="3.4cm" svg:height="0.6cm" svg:x="7.3cm" svg:y="11.4cm">
          <text:p text:style-name="P11"><text:span text:style-name="T5">EepWrite(Capacity)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0" draw:id="id10" draw:layer="layout" svg:width="4cm" svg:height="0.6cm" svg:x="7cm" svg:y="18.1cm">
          <text:p text:style-name="P11"><text:span text:style-name="T5">Power Off</text:span></text:p>
          <draw:enhanced-geometry svg:viewBox="0 0 21600 21600" draw:type="rectangle" draw:enhanced-path="M 0 0 L 21600 0 21600 21600 0 21600 0 0 Z N"/>
        </draw:custom-shape>
        <draw:connector draw:style-name="gr10" draw:text-style-name="P16" draw:layer="layout" svg:x1="10.5cm" svg:y1="11cm" svg:x2="9cm" svg:y2="11.4cm" draw:start-shape="id8" draw:start-glue-point="5" draw:end-shape="id9" draw:end-glue-point="0" svg:d="M10500 11000h-1500v400" svg:viewBox="0 0 1501 401">
          <text:p text:style-name="P15"><text:span text:style-name="T4">&gt; 120</text:span></text:p>
        </draw:connector>
        <draw:connector draw:style-name="gr17" draw:text-style-name="P19" draw:layer="layout" svg:x1="9cm" svg:y1="12cm" svg:x2="9cm" svg:y2="18.1cm" draw:start-shape="id9" draw:start-glue-point="2" draw:end-shape="id10" draw:end-glue-point="0" svg:d="M9000 12000v6100" svg:viewBox="0 0 1 6101">
          <text:p/>
        </draw:connector>
        <draw:connector draw:style-name="gr17" draw:text-style-name="P19" draw:layer="layout" svg:x1="10cm" svg:y1="5.8cm" svg:x2="10cm" svg:y2="7.2cm" draw:start-shape="id11" draw:end-shape="id2" draw:end-glue-point="0" svg:d="M10000 5800v1400" svg:viewBox="0 0 1 1401">
          <text:p/>
        </draw:connector>
        <draw:connector draw:style-name="gr17" draw:text-style-name="P19" draw:layer="layout" svg:x1="10cm" svg:y1="7.8cm" svg:x2="10cm" svg:y2="8.5cm" draw:start-shape="id2" draw:start-glue-point="2" draw:end-shape="id5" draw:end-glue-point="4" svg:d="M10000 7800v700" svg:viewBox="0 0 1 701">
          <text:p/>
        </draw:connector>
        <draw:connector draw:style-name="gr17" draw:text-style-name="P19" draw:layer="layout" svg:x1="9cm" svg:y1="19cm" svg:x2="9cm" svg:y2="20cm" draw:start-shape="id12" draw:start-glue-point="6" draw:end-shape="id13" draw:end-glue-point="4" svg:d="M9000 19000v1000" svg:viewBox="0 0 1 1001">
          <text:p/>
        </draw:connector>
        <draw:connector draw:style-name="gr17" draw:text-style-name="P19" draw:layer="layout" svg:x1="9cm" svg:y1="2cm" svg:x2="9cm" svg:y2="3.001cm" draw:start-shape="id14" draw:start-glue-point="8" draw:end-shape="id15" draw:end-glue-point="4" svg:d="M9000 2000v1001" svg:viewBox="0 0 1 1002">
          <text:p/>
        </draw:connector>
        <draw:connector draw:style-name="gr17" draw:text-style-name="P19" draw:layer="layout" svg:x1="9cm" svg:y1="4.001cm" svg:x2="9cm" svg:y2="5cm" draw:start-shape="id15" draw:start-glue-point="6" draw:end-shape="id16" draw:end-glue-point="4" svg:d="M9000 4001v999" svg:viewBox="0 0 1 1000">
          <text:p/>
        </draw:connector>
        <draw:custom-shape draw:style-name="gr18" draw:text-style-name="P21" xml:id="id4" draw:id="id4" draw:layer="layout" svg:width="4.2cm" svg:height="0.6cm" svg:x="3.8cm" svg:y="14cm">
          <text:p text:style-name="P20"><text:span text:style-name="T6">Set BATT_STAT_DISCHARGING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svg:x1="5.9cm" svg:y1="14.6cm" svg:x2="5.9cm" svg:y2="15cm" draw:start-shape="id4" draw:start-glue-point="2" draw:end-shape="id1" draw:end-glue-point="4" svg:d="M5900 14600v400" svg:viewBox="0 0 1 401">
          <text:p/>
        </draw:connector>
        <draw:custom-shape draw:style-name="gr20" draw:text-style-name="P21" xml:id="id6" draw:id="id6" draw:layer="layout" svg:width="4.4cm" svg:height="0.6cm" svg:x="10.318cm" svg:y="14cm">
          <text:p text:style-name="P20"><text:span text:style-name="T6">Clear BATT_STAT_DISCHARGING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svg:x1="12.518cm" svg:y1="14.6cm" svg:x2="12.8cm" svg:y2="15cm" draw:start-shape="id6" draw:start-glue-point="2" draw:end-shape="id7" draw:end-glue-point="4" svg:d="M12518 14600v200h282v200" svg:viewBox="0 0 283 401">
          <text:p/>
        </draw:connector>
        <draw:connector draw:style-name="gr21" draw:text-style-name="P17" draw:layer="layout" draw:line-skew="-0.402cm" svg:x1="13.5cm" svg:y1="11cm" svg:x2="11.2cm" svg:y2="7.5cm" draw:start-shape="id8" draw:start-glue-point="7" draw:end-shape="id2" draw:end-glue-point="1" svg:d="M13500 11000h100v-3500h-2400" svg:viewBox="0 0 2401 3501">
          <text:p/>
        </draw:connector>
        <draw:connector draw:style-name="gr22" draw:text-style-name="P17" draw:layer="layout" svg:x1="11.3cm" svg:y1="15.5cm" svg:x2="10.318cm" svg:y2="14.3cm" draw:start-shape="id7" draw:start-glue-point="5" draw:end-shape="id6" draw:end-glue-point="3" svg:d="M11300 15500h-1521v-1200h539" svg:viewBox="0 0 1522 1201">
          <text:p/>
        </draw:connector>
        <draw:connector draw:style-name="gr22" draw:text-style-name="P17" draw:layer="layout" draw:line-skew="-0.115cm" svg:x1="7.4cm" svg:y1="15.5cm" svg:x2="8cm" svg:y2="14.3cm" draw:start-shape="id1" draw:start-glue-point="7" draw:end-shape="id4" draw:end-glue-point="1" svg:d="M7400 15500h1000v-1200h-400" svg:viewBox="0 0 1001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6T23:12:14.829353957</meta:creation-date>
    <dc:date>2025-04-30T10:39:47.541904361</dc:date>
    <meta:editing-duration>PT25M18S</meta:editing-duration>
    <meta:editing-cycles>4</meta:editing-cycles>
    <meta:generator>LibreOffice/6.4.7.2$Linux_X86_64 LibreOffice_project/40$Build-2</meta:generator>
    <meta:document-statistic meta:object-count="37"/>
  </office:meta>
</office:document-meta>
</file>