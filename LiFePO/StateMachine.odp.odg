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4cm" fo:min-width="3.036cm"/>
      <style:paragraph-properties style:writing-mode="lr-tb"/>
    </style:style>
    <style:style style:name="gr2" style:family="graphic" style:parent-style-name="standard">
      <style:graphic-properties svg:stroke-color="#ea7500" draw:fill="none" draw:textarea-horizontal-align="justify" draw:textarea-vertical-align="middle" draw:auto-grow-height="false" fo:min-height="0.65cm" fo:min-width="1.6cm"/>
      <style:paragraph-properties style:writing-mode="lr-tb"/>
    </style:style>
    <style:style style:name="gr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5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67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6cm" fo:min-width="9.686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2.528cm" fo:min-width="5.056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2.528cm" fo:min-width="10.6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margin-left="0cm" fo:margin-right="0cm" fo:margin-top="0cm" fo:margin-bottom="0.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top="0cm" fo:margin-bottom="0.6cm" fo:text-align="center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.5pt" style:font-size-asian="5.40000009536743pt" style:font-size-complex="5.4000000953674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.4cm" svg:x="7cm" svg:y="1cm">
          <text:p text:style-name="P1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2cm" svg:height="1.8cm" svg:x="3.588cm" svg:y="8.029cm">
          <text:p text:style-name="P1">Curr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cm" svg:height="0.8cm" svg:x="4cm" svg:y="5.1cm">
          <text:p text:style-name="P3"><text:span text:style-name="T1">Set BATT_STAT_INI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1.7cm" svg:x="8.4cm" svg:y="1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1cm" svg:height="1cm" svg:x="2cm" svg:y="3.001cm">
          <text:p text:style-name="P1">NE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11cm" svg:height="1cm" svg:x="2cm" svg:y="5cm">
          <text:p text:style-name="P5">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4" draw:id="id4" draw:layer="layout" svg:width="6cm" svg:height="3cm" svg:x="2cm" svg:y="7cm">
          <text:p text:style-name="P5">DISCHAR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6" xml:id="id2" draw:id="id2" draw:layer="layout" svg:width="12cm" svg:height="3cm" svg:x="3cm" svg:y="11cm">
          <text:p text:style-name="P5">NACHLAU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draw:layer="layout" svg:width="6cm" svg:height="3cm" svg:x="10cm" svg:y="7cm">
          <text:p text:style-name="P5">CHAR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2cm" svg:height="1.8cm" svg:x="6.9cm" svg:y="13.5cm">
          <text:p text:style-name="P1">Curr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2cm" svg:height="1.8cm" svg:x="9.9cm" svg:y="12.1cm">
          <text:p text:style-name="P1">Curr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" draw:id="id3" draw:layer="layout" svg:width="4.2cm" svg:height="1.8cm" svg:x="3.9cm" svg:y="12.5cm">
          <text:p text:style-name="P1">Curr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2cm" svg:height="1.8cm" svg:x="11.7cm" svg:y="8.1cm">
          <text:p text:style-name="P1">Curr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8" draw:layer="layout" draw:line-skew="0.285cm" svg:x1="5.688cm" svg:y1="9.829cm" svg:x2="3cm" svg:y2="12.5cm" draw:start-shape="id1" draw:start-glue-point="6" draw:end-shape="id2" draw:end-glue-point="5" svg:d="M5688 9829v871h-3189v1800h501" svg:viewBox="0 0 3190 2672">
          <text:p text:style-name="P7"><text:span text:style-name="T2">&gt; -20</text:span></text:p>
        </draw:connector>
        <draw:connector draw:style-name="gr9" draw:text-style-name="P10" draw:layer="layout" svg:x1="6cm" svg:y1="14.3cm" svg:x2="2cm" svg:y2="8.5cm" draw:start-shape="id3" draw:start-glue-point="6" draw:end-shape="id4" draw:end-glue-point="5" svg:d="M6000 14300v501h-4501v-6301h501" svg:viewBox="0 0 4502 6302">
          <text:p text:style-name="P9"><text:span text:style-name="T3">&lt; -30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6T23:12:14.829353957</meta:creation-date>
    <dc:date>2025-04-27T00:14:42.887554806</dc:date>
    <meta:editing-duration>PT35S</meta:editing-duration>
    <meta:editing-cycles>1</meta:editing-cycles>
    <meta:document-statistic meta:object-count="15"/>
    <meta:generator>LibreOffice/6.4.7.2$Linux_X86_64 LibreOffice_project/40$Build-2</meta:generator>
  </office:meta>
</office:document-meta>
</file>